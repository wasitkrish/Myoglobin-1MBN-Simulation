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8C000005DC9E5B7583.png" manifest:media-type="image/png"/>
  <manifest:file-entry manifest:full-path="Pictures/1000000100000280000001E0726AC3C1.png" manifest:media-type="image/png"/>
  <manifest:file-entry manifest:full-path="Pictures/10000001000006E9000005BE89422A5E.png" manifest:media-type="image/png"/>
  <manifest:file-entry manifest:full-path="Pictures/1000000100000A8C000005DC71B6C5DF.png" manifest:media-type="image/png"/>
  <manifest:file-entry manifest:full-path="Pictures/1000000100000280000001E0C754855E.png" manifest:media-type="image/png"/>
  <manifest:file-entry manifest:full-path="Pictures/100000010000033A000000B38CAE4B2D.png" manifest:media-type="image/png"/>
  <manifest:file-entry manifest:full-path="Pictures/1000000100000A8C000005DC0B146D10.png" manifest:media-type="image/png"/>
  <manifest:file-entry manifest:full-path="Pictures/1000000100000A8C000005DC3C1891C2.png" manifest:media-type="image/png"/>
  <manifest:file-entry manifest:full-path="Pictures/100000010000033A000000B348F3EA5A.png" manifest:media-type="image/png"/>
  <manifest:file-entry manifest:full-path="Pictures/1000000100000280000001E07167B52F.png" manifest:media-type="image/png"/>
  <manifest:file-entry manifest:full-path="Pictures/10000001000006E6000005BED8BB46C4.png" manifest:media-type="image/png"/>
  <manifest:file-entry manifest:full-path="Pictures/1000000100000A8C000005DCF96F4FA7.png" manifest:media-type="image/png"/>
  <manifest:file-entry manifest:full-path="Pictures/1000000100000CE400000708338D100E.png" manifest:media-type="image/png"/>
  <manifest:file-entry manifest:full-path="Pictures/1000000100000A8C000005DCFAECD0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4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pr1" style:family="presentation" style:parent-style-name="DNA-title">
      <style:graphic-properties fo:min-height="4.691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0.975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subtitle">
      <style:graphic-properties draw:fill-color="#ffffff" fo:min-height="5.401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DNA-subtitle">
      <style:graphic-properties draw:fill-color="#ffffff" fo:min-height="11.217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pr9" style:family="presentation" style:parent-style-name="DNA-outline1">
      <style:graphic-properties fo:min-height="9.135cm" loext:decorative="false"/>
      <style:paragraph-properties style:writing-mode="lr-tb"/>
    </style:style>
    <style:style style:name="pr10" style:family="presentation" style:parent-style-name="DNA-subtitle">
      <style:graphic-properties draw:fill-color="#ffffff" fo:min-height="8.073cm" loext:decorative="false"/>
      <style:paragraph-properties style:writing-mode="lr-tb"/>
    </style:style>
    <style:style style:name="pr11" style:family="presentation" style:parent-style-name="DNA-subtitle">
      <style:graphic-properties draw:fill-color="#ffffff" fo:min-height="6.584cm" loext:decorative="false"/>
      <style:paragraph-properties style:writing-mode="lr-tb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c9211e" loext:opacity="100%"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2a6099" loext:opacity="100%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P11" style:family="paragraph">
      <style:text-properties fo:color="#ff7b59" loext:opacity="100%"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2a6099" loext:opacity="100%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2cm" fo:margin-bottom="0.35cm" fo:text-align="start" fo:text-indent="0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.42cm" fo:margin-bottom="0.35cm" fo:text-align="justify"/>
    </style:style>
    <style:style style:name="P18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1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P23" style:family="paragraph"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24" style:family="paragraph">
      <loext:graphic-properties draw:fill-color="#ffffff"/>
      <style:paragraph-properties fo:margin-top="0.42cm" fo:margin-bottom="0.35cm"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a933" loext:opacity="100%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7b59" loext:opacity="100%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c9211e" loext:opacity="100%" fo:font-size="25pt" style:font-size-asian="25pt" style:font-size-complex="25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" fo:font-size="18pt" style:font-size-asian="18pt" style:font-size-complex="18pt"/>
    </style:style>
    <style:style style:name="T18" style:family="text">
      <style:text-properties fo:color="#ff7b59" loext:opacity="100%" style:font-name="Liberation Sans"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4.691cm" svg:x="4.805cm" svg:y="4.834cm" presentation:class="title" presentation:user-transformed="true">
          <draw:text-box>
            <text:p><text:span text:style-name="T1">Myoglobi</text:span><text:span text:style-name="T1">n</text:span><text:span text:style-name="T2"> </text:span><text:span text:style-name="T3">1MBN</text:span><text:span text:style-name="T4"> </text:span><text:span text:style-name="T2"><text:line-break/></text:span><text:span text:style-name="T5">Simulatio</text:span><text:span text:style-name="T5">n</text:span></text:p>
          </draw:text-box>
        </draw:frame>
        <draw:frame presentation:style-name="pr2" draw:text-style-name="P3" draw:layer="layout" svg:width="8.597cm" svg:height="0.975cm" draw:transform="rotate (0.00314159265358979) translate (11.72cm 10.455cm)" presentation:class="subtitle" presentation:user-transformed="true">
          <draw:text-box>
            <text:p text:style-name="P2"><text:span text:style-name="T6">By – Krish Sing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text-style-name="P6" draw:layer="layout" svg:width="22.5cm" svg:height="2.6cm" svg:x="4.805cm" svg:y="1.973cm" presentation:class="title" presentation:user-transformed="true">
          <draw:text-box>
            <text:p text:style-name="P5"><text:span text:style-name="T1">Objective</text:span></text:p>
          </draw:text-box>
        </draw:frame>
        <draw:frame presentation:style-name="pr5" draw:text-style-name="P9" draw:layer="layout" svg:width="22.5cm" svg:height="5.401cm" svg:x="4.445cm" svg:y="4.641cm" presentation:class="subtitle" presentation:user-transformed="true">
          <draw:text-box>
            <text:p text:style-name="P7"><text:span text:style-name="T7"/></text:p>
            <text:list text:style-name="L1">
              <text:list-item>
                <text:p text:style-name="P8"><text:span text:style-name="T8"><text:s/></text:span><text:span text:style-name="T8">To simulate </text:span><text:span text:style-name="T8">protein in water</text:span></text:p>
              </text:list-item>
              <text:list-item>
                <text:p text:style-name="P8"><text:span text:style-name="T8"><text:s/></text:span><text:span text:style-name="T8">To analyze </text:span><text:span text:style-name="T8">structural </text:span><text:span text:style-name="T8">stability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4" draw:text-style-name="P10" draw:layer="layout" svg:width="22.5cm" svg:height="2.6cm" svg:x="4.445cm" svg:y="1.21cm" presentation:class="title" presentation:user-transformed="true">
          <draw:text-box>
            <text:p text:style-name="P5"><text:span text:style-name="T10">What was </text:span><text:span text:style-name="T10">done ?</text:span></text:p>
          </draw:text-box>
        </draw:frame>
        <draw:frame presentation:style-name="pr7" draw:text-style-name="P9" draw:layer="layout" svg:width="22.5cm" svg:height="11.217cm" svg:x="5.08cm" svg:y="3.235cm" presentation:class="subtitle" presentation:user-transformed="true">
          <draw:text-box>
            <text:p text:style-name="P7"><text:span text:style-name="T11"/></text:p>
            <text:list text:style-name="L1">
              <text:list-item>
                <text:p text:style-name="P8"><text:span text:style-name="T12"><text:s/></text:span><text:span text:style-name="T12">Cleaned the structure (removed </text:span><text:span text:style-name="T12">HETATM, water, etc.)</text:span></text:p>
              </text:list-item>
              <text:list-item>
                <text:p text:style-name="P8"><text:span text:style-name="T12"><text:s/></text:span><text:span text:style-name="T12">Put it in a water box</text:span></text:p>
              </text:list-item>
              <text:list-item>
                <text:p text:style-name="P8"><text:span text:style-name="T12"><text:s/></text:span><text:span text:style-name="T12">Added ions</text:span></text:p>
              </text:list-item>
              <text:list-item>
                <text:p text:style-name="P8"><text:span text:style-name="T12"><text:s/></text:span><text:span text:style-name="T12">Minimized energy</text:span></text:p>
              </text:list-item>
              <text:list-item>
                <text:p text:style-name="P8"><text:span text:style-name="T12"><text:s/></text:span><text:span text:style-name="T12">Ran equilibration</text:span></text:p>
              </text:list-item>
              <text:list-item>
                <text:p text:style-name="P8"><text:span text:style-name="T12"><text:s/></text:span><text:span text:style-name="T12">Ran production MD</text:span></text:p>
              </text:list-item>
              <text:list-item>
                <text:p text:style-name="P8"><text:span text:style-name="T12"><text:s/></text:span><text:span text:style-name="T12">Generated trajectory file </text:span><text:span text:style-name="T12">(md.xtc)</text:span></text:p>
              </text:list-item>
              <text:list-item>
                <text:p text:style-name="P8"><text:span text:style-name="T12"><text:s/></text:span><text:span text:style-name="T12">Analyzed that trajectory using </text:span><text:span text:style-name="T12">GROMACS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4" draw:text-style-name="P11" draw:layer="layout" svg:width="22.5cm" svg:height="2.6cm" svg:x="4.445cm" svg:y="5.879cm" presentation:class="title" presentation:user-transformed="true">
          <draw:text-box>
            <text:p><text:span text:style-name="T1">OBSERV</text:span><text:span text:style-name="T1">A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2">
        <office:forms form:automatic-focus="false" form:apply-design-mode="false"/>
        <draw:frame presentation:style-name="pr4" draw:text-style-name="P13" draw:layer="layout" svg:width="22.5cm" svg:height="2.6cm" svg:x="4.5cm" svg:y="0cm" presentation:class="title" presentation:user-transformed="true">
          <draw:text-box>
            <text:p><text:span text:style-name="T13">RMSD (Root Mean </text:span><text:span text:style-name="T13">Square Deviation)</text:span></text:p>
          </draw:text-box>
        </draw:frame>
        <draw:frame draw:style-name="gr2" draw:text-style-name="P14" draw:layer="layout" svg:width="10.979cm" svg:height="8.234cm" svg:x="4.5cm" svg:y="2.54cm" presentation:class="graphic" presentation:user-transformed="true">
          <draw:image xlink:href="Pictures/1000000100000280000001E0726AC3C1.png" xlink:type="simple" xlink:show="embed" xlink:actuate="onLoad" draw:mime-type="image/png">
            <text:p/>
          </draw:image>
        </draw:frame>
        <draw:frame draw:style-name="gr2" draw:text-style-name="P14" draw:layer="layout" svg:width="17.687cm" svg:height="3.831cm" svg:x="5.715cm" svg:y="10.774cm" presentation:class="graphic" presentation:user-transformed="true">
          <draw:image xlink:href="Pictures/100000010000033A000000B348F3EA5A.png" xlink:type="simple" xlink:show="embed" xlink:actuate="onLoad" draw:mime-type="image/png">
            <text:p/>
          </draw:image>
        </draw:frame>
        <draw:frame presentation:style-name="pr8" draw:layer="layout" svg:width="10.979cm" svg:height="6.35cm" svg:x="16.029cm" svg:y="3.175cm" presentation:class="outline" presentation:user-transformed="true">
          <draw:text-box>
            <text:list text:style-name="L3">
              <text:list-item>
                <text:p text:style-name="P15"><text:span text:style-name="T14">The RMSD at frame 5000 was 0.1937267 nm, compared to 0.00 nm at frame 0.</text:span></text:p>
              </text:list-item>
              <text:list-item>
                <text:p text:style-name="P15"><text:span text:style-name="T14">The RMSD increased initially due to structural relaxation and then stabilized, indicating that the system reached equilibrium and remained structurally stabl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2">
        <office:forms form:automatic-focus="false" form:apply-design-mode="false"/>
        <draw:frame presentation:style-name="pr4" draw:text-style-name="P13" draw:layer="layout" svg:width="22.5cm" svg:height="2.6cm" svg:x="4.5cm" svg:y="0cm" presentation:class="title" presentation:user-transformed="true">
          <draw:text-box>
            <text:p><text:span text:style-name="T13">Radius of Gyration </text:span><text:span text:style-name="T13">(Rg)</text:span></text:p>
          </draw:text-box>
        </draw:frame>
        <draw:frame draw:style-name="gr2" draw:text-style-name="P14" draw:layer="layout" svg:width="10.979cm" svg:height="8.234cm" svg:x="4.5cm" svg:y="2.54cm" presentation:class="graphic" presentation:user-transformed="true">
          <draw:image xlink:href="Pictures/10000001000006E9000005BE89422A5E.png" xlink:type="simple" xlink:show="embed" xlink:actuate="onLoad" draw:mime-type="image/png">
            <text:p/>
          </draw:image>
        </draw:frame>
        <draw:frame draw:style-name="gr2" draw:text-style-name="P14" draw:layer="layout" svg:width="16.842cm" svg:height="3.648cm" svg:x="5.715cm" svg:y="10.957cm" presentation:class="graphic" presentation:user-transformed="true">
          <draw:image xlink:href="Pictures/100000010000033A000000B38CAE4B2D.png" xlink:type="simple" xlink:show="embed" xlink:actuate="onLoad" draw:mime-type="image/png">
            <text:p/>
          </draw:image>
        </draw:frame>
        <draw:frame presentation:style-name="pr8" draw:text-style-name="P16" draw:layer="layout" svg:width="10.979cm" svg:height="6.985cm" svg:x="16.029cm" svg:y="3.175cm" presentation:class="outline" presentation:user-transformed="true">
          <draw:text-box>
            <text:list text:style-name="L3">
              <text:list-item>
                <text:p text:style-name="P8"><text:span text:style-name="T14">The Radius of Gyration at frame 5000 was 1.543536 nm, compared to 1.537685 nm at frame 0.</text:span></text:p>
              </text:list-item>
              <text:list-item>
                <text:p text:style-name="P8"><text:span text:style-name="T14">The Rg remained relatively constant, suggesting that the protein maintained its compact folded structure throughout the simulation.</text:span></text:p>
                <text:p text:style-name="P8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 presentation:user-transformed="true">
          <draw:text-box>
            <text:p><text:span text:style-name="T13">RMSF (Root Mean </text:span><text:span text:style-name="T13">Square </text:span><text:span text:style-name="T13">Fluctuations)</text:span></text:p>
          </draw:text-box>
        </draw:frame>
        <draw:frame draw:style-name="gr2" draw:text-style-name="P14" draw:layer="layout" svg:width="10.979cm" svg:height="8.234cm" svg:x="4.499cm" svg:y="4.25cm" presentation:class="graphic" presentation:user-transformed="true">
          <draw:image xlink:href="Pictures/10000001000006E6000005BED8BB46C4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9.134cm" svg:x="16.029cm" svg:y="3.8cm" presentation:class="outline" presentation:user-transformed="true">
          <draw:text-box>
            <text:list text:style-name="L3">
              <text:list-item>
                <text:p text:style-name="P7"><text:span text:style-name="T15">Small values (~0.1–0.18 nm)</text:span></text:p>
              </text:list-item>
              <text:list-item>
                <text:p text:style-name="P8"><text:span text:style-name="T14">Peaks at certain residues.</text:span></text:p>
              </text:list-item>
              <text:list-item>
                <text:p text:style-name="P8"><text:span text:style-name="T14">Most atoms/residues are stable.</text:span></text:p>
              </text:list-item>
              <text:list-item>
                <text:p text:style-name="P8"><text:span text:style-name="T14">Peaks = flexible loops or terminal regions.</text:span></text:p>
              </text:list-item>
              <text:list-item>
                <text:p text:style-name="P8"><text:span text:style-name="T14">It shows Normal behaviour.</text:span></text:p>
              </text:list-item>
              <text:list-item>
                <text:p text:style-name="P15"><text:span text:style-name="T14">High RMSF (&gt;0.4 nm) is considered unstable.</text:span></text:p>
              </text:list-item>
              <text:list-item>
                <text:p text:style-name="P8"><text:span text:style-name="T14">We don’t have tha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SASA (Solvent </text:span><text:span text:style-name="T13">Accessible Surface </text:span><text:span text:style-name="T13">Area)</text:span></text:p>
          </draw:text-box>
        </draw:frame>
        <draw:frame draw:style-name="gr2" draw:text-style-name="P14" draw:layer="layout" svg:width="10.979cm" svg:height="8.234cm" svg:x="4.896cm" svg:y="3.2cm" presentation:class="graphic" presentation:user-transformed="true">
          <draw:image xlink:href="Pictures/1000000100000280000001E07167B52F.png" xlink:type="simple" xlink:show="embed" xlink:actuate="onLoad" draw:mime-type="image/png">
            <text:p/>
          </draw:image>
        </draw:frame>
        <draw:frame presentation:style-name="pr9" draw:layer="layout" svg:width="10.979cm" svg:height="9.535cm" svg:x="16.029cm" svg:y="3.8cm" presentation:class="outline" presentation:user-transformed="true">
          <draw:text-box>
            <text:list text:style-name="L3">
              <text:list-item>
                <text:p text:style-name="P7"><text:span text:style-name="T16">Value around ~85 nm² with small fluctuations.</text:span></text:p>
              </text:list-item>
              <text:list-item>
                <text:p text:style-name="P8"><text:span text:style-name="T17">Structure not unfolding dramatically.</text:span></text:p>
              </text:list-item>
              <text:list-item>
                <text:p text:style-name="P8"><text:span text:style-name="T17">No large exposure of hydrophobic core.</text:span></text:p>
              </text:list-item>
              <text:list-item>
                <text:p text:style-name="P8"><text:span text:style-name="T17">System is structurally stable.</text:span></text:p>
                <text:p text:style-name="P8"><text:span text:style-name="T17"/></text:p>
                <text:p text:style-name="P8"><text:span text:style-name="T18">If protein unfolds SASA increases</text:span></text:p>
                <text:p text:style-name="P8"><text:span text:style-name="T18">If protein stays folded SASA is stable</text:span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Hydrogen Bonds</text:span></text:p>
          </draw:text-box>
        </draw:frame>
        <draw:frame draw:style-name="gr2" draw:text-style-name="P14" draw:layer="layout" svg:width="10.979cm" svg:height="8.869cm" svg:x="4.522cm" svg:y="3.196cm" presentation:class="graphic" presentation:user-transformed="true">
          <draw:image xlink:href="Pictures/1000000100000280000001E0C754855E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445cm" presentation:class="outline" presentation:user-transformed="true">
          <draw:text-box>
            <text:list text:style-name="L3">
              <text:list-item>
                <text:p text:style-name="P7"><text:span text:style-name="T15">Around 125–140 H-bonds </text:span><text:span text:style-name="T15">fluctuating slightly.</text:span></text:p>
              </text:list-item>
              <text:list-item>
                <text:p text:style-name="P8"><text:span text:style-name="T14">Hydrogen bond network is stable.</text:span></text:p>
              </text:list-item>
              <text:list-item>
                <text:p text:style-name="P8"><text:span text:style-name="T14">No major structural collapse.</text:span></text:p>
              </text:list-item>
              <text:list-item>
                <text:p text:style-name="P8"><text:span text:style-name="T14"><text:s/></text:span><text:span text:style-name="T14">Protein/polymer interactions are </text:span><text:span text:style-name="T14">maintain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DSSP (Secondary </text:span><text:span text:style-name="T13">Structure </text:span><text:span text:style-name="T13">Evaluation)</text:span></text:p>
          </draw:text-box>
        </draw:frame>
        <draw:frame draw:style-name="gr2" draw:text-style-name="P14" draw:layer="layout" svg:width="12.646cm" svg:height="8.234cm" svg:x="4.499cm" svg:y="4.25cm" presentation:class="graphic" presentation:user-transformed="true">
          <draw:image xlink:href="Pictures/1000000100000CE400000708338D100E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445cm" presentation:class="outline" presentation:user-transformed="true">
          <draw:text-box>
            <text:list text:style-name="L3">
              <text:list-item>
                <text:p text:style-name="P8"><text:span text:style-name="T15">Alpha helices stay almost constant with only small changes.</text:span></text:p>
              </text:list-item>
              <text:list-item>
                <text:p text:style-name="P8"><text:span text:style-name="T15">Turns and loops move a little, which is normal flexibility.</text:span></text:p>
              </text:list-item>
              <text:list-item>
                <text:p text:style-name="P8"><text:span text:style-name="T15">Very few beta strands appear, so no major structure change happened.</text:span></text:p>
              </text:list-item>
              <text:list-item>
                <text:p text:style-name="P8"><text:span text:style-name="T15">Overall secondary structure stayed stable during the whole simul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Temperature</text:span></text:p>
          </draw:text-box>
        </draw:frame>
        <draw:frame draw:style-name="gr2" draw:text-style-name="P14" draw:layer="layout" svg:width="10.979cm" svg:height="9.309cm" svg:x="4.499cm" svg:y="3.175cm" presentation:class="graphic" presentation:user-transformed="true">
          <draw:image xlink:href="Pictures/1000000100000A8C000005DC71B6C5DF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211cm" presentation:class="outline" presentation:user-transformed="true">
          <draw:text-box>
            <text:list text:style-name="L3">
              <text:list-item>
                <text:p text:style-name="P8"><text:span text:style-name="T15">Temperature rapidly increases from ~0 K to ~300 K at the start.</text:span></text:p>
              </text:list-item>
              <text:list-item>
                <text:p text:style-name="P8"><text:span text:style-name="T15">Stabilizes around the target temperature (~300 K).</text:span></text:p>
              </text:list-item>
              <text:list-item>
                <text:p text:style-name="P8"><text:span text:style-name="T15">Minor fluctuations (≈296–303 K) are due to normal thermal motion.</text:span></text:p>
              </text:list-item>
              <text:list-item>
                <text:p text:style-name="P8"><text:span text:style-name="T15">Confirms proper thermostat control and successful NVT equilibration.</text:span></text:p>
              </text:list-item>
            </text:list>
          </draw:text-box>
        </draw:frame>
        <draw:frame draw:style-name="gr3" draw:text-style-name="P18" draw:layer="layout" svg:width="10.795cm" svg:height="1.433cm" svg:x="5.08cm" svg:y="12.596cm">
          <draw:text-box>
            <text:p text:style-name="P17"><text:span text:style-name="T9">The temperature quickly reached the target value (~300 K) and </text:span><text:span text:style-name="T9">remained stable with small fluctuations, indicating proper </text:span><text:span text:style-name="T9">performance and thermal equilibration of the system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Pressure</text:span></text:p>
          </draw:text-box>
        </draw:frame>
        <draw:frame draw:style-name="gr2" draw:text-style-name="P14" draw:layer="layout" svg:width="10.979cm" svg:height="8.844cm" svg:x="4.445cm" svg:y="3.2cm" presentation:class="graphic" presentation:user-transformed="true">
          <draw:image xlink:href="Pictures/1000000100000A8C000005DC0B146D10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3.81cm" presentation:class="outline" presentation:user-transformed="true">
          <draw:text-box>
            <text:list text:style-name="L3">
              <text:list-item>
                <text:p text:style-name="P8"><text:span text:style-name="T15">Pressure shows large fluctuations during equilibration phase.</text:span></text:p>
              </text:list-item>
              <text:list-item>
                <text:p text:style-name="P8"><text:span text:style-name="T15">Values oscillate around the target pressure (~0 bar).</text:span></text:p>
              </text:list-item>
              <text:list-item>
                <text:p text:style-name="P8"><text:span text:style-name="T15">Wide variations are normal for small MD systems.</text:span></text:p>
              </text:list-item>
              <text:list-item>
                <text:p text:style-name="P8"><text:span text:style-name="T15">Confirms active pressure coupling and proper NPT equilibration.</text:span></text:p>
                <text:p text:style-name="P8"><text:span text:style-name="T15"/></text:p>
              </text:list-item>
            </text:list>
          </draw:text-box>
        </draw:frame>
        <draw:frame draw:style-name="gr4" draw:text-style-name="P18" draw:layer="layout" svg:width="10.795cm" svg:height="1.905cm" svg:x="5.08cm" svg:y="12.189cm">
          <draw:text-box>
            <text:p text:style-name="P17"><text:span text:style-name="T9">The pressure fluctuates widely between positive and negative </text:span><text:span text:style-name="T9">values but oscillates around ~0 bar. This is normal during NPT </text:span><text:span text:style-name="T9">equilibration and indicates the system is adjusting its volume to </text:span><text:span text:style-name="T9">reach the target pressu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Density</text:span></text:p>
          </draw:text-box>
        </draw:frame>
        <draw:frame draw:style-name="gr2" draw:text-style-name="P14" draw:layer="layout" svg:width="10.979cm" svg:height="8.89cm" svg:x="4.499cm" svg:y="3.175cm" presentation:class="graphic" presentation:user-transformed="true">
          <draw:image xlink:href="Pictures/1000000100000A8C000005DC3C1891C2.png" xlink:type="simple" xlink:show="embed" xlink:actuate="onLoad" draw:mime-type="image/png">
            <text:p/>
          </draw:image>
        </draw:frame>
        <draw:frame presentation:style-name="pr9" draw:text-style-name="P16" draw:layer="layout" svg:width="10.659cm" svg:height="8.164cm" svg:x="16.011cm" svg:y="3.901cm" presentation:class="outline" presentation:user-transformed="true">
          <draw:text-box>
            <text:list text:style-name="L3">
              <text:list-item>
                <text:p text:style-name="P8"><text:span text:style-name="T15">Initial rise indicates system equilibration during early simulation.</text:span></text:p>
              </text:list-item>
              <text:list-item>
                <text:p text:style-name="P8"><text:span text:style-name="T15">Density stabilizes around expected water density (~1020 kg/m³).</text:span></text:p>
              </text:list-item>
              <text:list-item>
                <text:p text:style-name="P8"><text:span text:style-name="T15">Small fluctuations show normal thermal motion.</text:span></text:p>
              </text:list-item>
              <text:list-item>
                <text:p text:style-name="P8"><text:span text:style-name="T15">Confirms proper and stable simulation.</text:span></text:p>
              </text:list-item>
            </text:list>
          </draw:text-box>
        </draw:frame>
        <draw:frame draw:style-name="gr5" draw:text-style-name="P19" draw:layer="layout" svg:width="10.795cm" svg:height="1.793cm" svg:x="5.08cm" svg:y="12.177cm">
          <draw:text-box>
            <text:p text:style-name="P7"><text:span text:style-name="T9">The density rises slightly at the start and then stays stable </text:span><text:span text:style-name="T9">around ~1020 kg/m³. This shows the system reached </text:span><text:span text:style-name="T9">equilibrium and the solvent box remained well-packed </text:span><text:span text:style-name="T9">throughout the simul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Potential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F96F4FA7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6.985cm" svg:x="16.326cm" svg:y="3.81cm" presentation:class="outline" presentation:user-transformed="true">
          <draw:text-box>
            <text:list text:style-name="L3">
              <text:list-item>
                <text:p text:style-name="P20"><text:span text:style-name="T15">Potential energy drops quickly at the beginning.</text:span></text:p>
              </text:list-item>
              <text:list-item>
                <text:p text:style-name="P20"><text:span text:style-name="T15">Then it slowly starts to level off as the system settles.</text:span></text:p>
              </text:list-item>
              <text:list-item>
                <text:p text:style-name="P20"><text:span text:style-name="T15">The more negative energy means bad contacts and clashes are being removed.</text:span></text:p>
              </text:list-item>
              <text:list-item>
                <text:p text:style-name="P20"><text:span text:style-name="T15">When the curve becomes almost flat, it shows the structure has reached a stable state.</text:span></text:p>
                <text:p text:style-name="P20"><text:span text:style-name="T15"/></text:p>
              </text:list-item>
            </text:list>
          </draw:text-box>
        </draw:frame>
        <draw:frame draw:style-name="gr6" draw:text-style-name="P18" draw:layer="layout" svg:width="11.43cm" svg:height="2.221cm" svg:x="5.715cm" svg:y="12.065cm">
          <draw:text-box>
            <text:p text:style-name="P21"><text:span text:style-name="T9">The potential energy steadily decreases from about −1.78 × </text:span><text:span text:style-name="T9">10⁵ kJ/mol to around −5.15 × 10⁵ kJ/mol, then begins to level </text:span><text:span text:style-name="T9">off. This shows that the system is relaxing to a lower-energy, </text:span><text:span text:style-name="T9">more stable configuration during energy minimization in </text:span><text:span text:style-name="T9">GROMACS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Kinetic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FAECD07C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6.985cm" svg:x="16.326cm" svg:y="3.81cm" presentation:class="outline" presentation:user-transformed="true">
          <draw:text-box>
            <text:list text:style-name="L3">
              <text:list-item>
                <text:p text:style-name="P20"><text:span text:style-name="T15">Kinetic energy fluctuates around ~8.1 × 10⁴ kJ/mol.</text:span></text:p>
              </text:list-item>
              <text:list-item>
                <text:p text:style-name="P20"><text:span text:style-name="T15">No systematic increase or decrease over time is observed.</text:span></text:p>
              </text:list-item>
              <text:list-item>
                <text:p text:style-name="P20"><text:span text:style-name="T15">Small fluctuations arise from normal thermal motion of atoms.</text:span></text:p>
              </text:list-item>
              <text:list-item>
                <text:p text:style-name="P20"><text:span text:style-name="T15">Confirms stable temperature control and good equilibration of the system.</text:span></text:p>
                <text:p text:style-name="P20"><text:span text:style-name="T15"/></text:p>
              </text:list-item>
            </text:list>
          </draw:text-box>
        </draw:frame>
        <draw:frame draw:style-name="gr4" draw:text-style-name="P18" draw:layer="layout" svg:width="10.16cm" svg:height="1.905cm" svg:x="5.715cm" svg:y="12.065cm">
          <draw:text-box>
            <text:p text:style-name="P21"><text:span text:style-name="T9">The kinetic energy fluctuates around ~81,000 kJ/mol </text:span><text:span text:style-name="T9">throughout the simulation. The variations are small and </text:span><text:span text:style-name="T9">random, indicating stable temperature and proper thermostat </text:span><text:span text:style-name="T9">control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Total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9E5B7583.png" xlink:type="simple" xlink:show="embed" xlink:actuate="onLoad" draw:mime-type="image/png">
            <text:p/>
          </draw:image>
        </draw:frame>
        <draw:frame presentation:style-name="pr9" draw:text-style-name="P20" draw:layer="layout" svg:width="10.344cm" svg:height="8.489cm" svg:x="16.326cm" svg:y="3.81cm" presentation:class="outline" presentation:user-transformed="true">
          <draw:text-box>
            <text:list text:style-name="L3">
              <text:list-item>
                <text:p text:style-name="P8"><text:span text:style-name="T15">Total energy remains stable around −3.94 × 10⁵ kJ/mol.</text:span></text:p>
              </text:list-item>
              <text:list-item>
                <text:p text:style-name="P8"><text:span text:style-name="T15">No noticeable drift indicates good energy conservation.</text:span></text:p>
              </text:list-item>
              <text:list-item>
                <text:p text:style-name="P8"><text:span text:style-name="T15">Small fluctuations arise from normal thermal motion.</text:span></text:p>
              </text:list-item>
              <text:list-item>
                <text:p text:style-name="P8"><text:span text:style-name="T15">Confirms the system is well equilibrated and simulation is stable.</text:span></text:p>
                <text:p text:style-name="P8"><text:span text:style-name="T19"/></text:p>
              </text:list-item>
            </text:list>
          </draw:text-box>
        </draw:frame>
        <draw:frame draw:style-name="gr7" draw:text-style-name="P18" draw:layer="layout" svg:width="10.795cm" svg:height="2.428cm" svg:x="5.715cm" svg:y="12.065cm">
          <draw:text-box>
            <text:p text:style-name="P17"><text:span text:style-name="T9">The total energy stays nearly constant around −3.94 × 10⁵ </text:span><text:span text:style-name="T9">kJ/mol with only small fluctuations. This shows the system </text:span><text:span text:style-name="T9">remained stable and well equilibrated during the 5 ns run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>
        <office:forms form:automatic-focus="false" form:apply-design-mode="false"/>
        <draw:frame presentation:style-name="pr4" draw:text-style-name="P22" draw:layer="layout" svg:width="22.5cm" svg:height="2.6cm" svg:x="4.445cm" svg:y="1.142cm" presentation:class="title" presentation:user-transformed="true">
          <draw:text-box>
            <text:p text:style-name="P2"><text:span text:style-name="T10">Conclusion</text:span></text:p>
          </draw:text-box>
        </draw:frame>
        <draw:frame presentation:style-name="pr10" draw:text-style-name="P9" draw:layer="layout" svg:width="22.5cm" svg:height="8.073cm" svg:x="4.445cm" svg:y="4.737cm" presentation:class="subtitle" presentation:user-transformed="true">
          <draw:text-box>
            <text:p text:style-name="P7"><text:span text:style-name="T20">All structural </text:span><text:span text:style-name="T20">parameters </text:span><text:span text:style-name="T20">remained stable. </text:span><text:span text:style-name="T20">The protein did </text:span><text:span text:style-name="T20">not unfold during </text:span><text:span text:style-name="T20">simulation. </text:span><text:span text:style-name="T20">Therefore, the </text:span><text:span text:style-name="T20">structure remained </text:span><text:span text:style-name="T20">stable in the </text:span><text:span text:style-name="T20">simulated aqueous </text:span><text:span text:style-name="T20">environment.</text:span></text:p>
            <text:p text:style-name="P8"><text:span text:style-name="T21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0">
        <office:forms form:automatic-focus="false" form:apply-design-mode="false"/>
        <draw:frame presentation:style-name="pr4" draw:text-style-name="P23" draw:layer="layout" svg:width="22.5cm" svg:height="2.6cm" svg:x="4.805cm" svg:y="2.54cm" presentation:class="title" presentation:user-transformed="true">
          <draw:text-box>
            <text:p text:style-name="P5"><text:span text:style-name="T10">References:</text:span></text:p>
          </draw:text-box>
        </draw:frame>
        <draw:frame presentation:style-name="pr11" draw:text-style-name="P24" draw:layer="layout" svg:width="22.5cm" svg:height="6.584cm" svg:x="4.805cm" svg:y="5.481cm" presentation:class="subtitle" presentation:user-transformed="true">
          <draw:text-box>
            <text:p text:style-name="P8"><text:span text:style-name="T11"><text:a xlink:href="http://www.mdtutorials.com/gmx/lysozyme/01_pdb2gmx.html" xlink:type="simple">http://www.mdtutorials.com/gmx/lysozyme/01_pdb2gmx.html</text:a></text:span><text:span text:style-name="T11"><text:line-break/></text:span><text:span text:style-name="T11"><text:a xlink:href="http://www.mdtutorials.com/gmx/lysozyme/index.html" xlink:type="simple">http://www.mdtutorials.com/gmx/lysozyme/index.html</text:a></text:span></text:p>
            <text:p text:style-name="P8"><text:span text:style-name="T11"/></text:p>
            <text:p text:style-name="P8"><text:span text:style-name="T11"><text:line-break/></text:span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3:03:30.089924202</meta:creation-date>
    <meta:editing-duration>PT5H34M9S</meta:editing-duration>
    <meta:editing-cycles>89</meta:editing-cycles>
    <meta:generator>LibreOffice/24.2.7.2$Linux_X86_64 LibreOffice_project/420$Build-2</meta:generator>
    <dc:title>DNA</dc:title>
    <dc:date>2026-02-21T03:15:46.902485988</dc:date>
    <meta:document-statistic meta:object-count="193"/>
  </office:meta>
</office:document-meta>
</file>